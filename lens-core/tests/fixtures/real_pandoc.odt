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h text:style-name="Heading_20_1" text:outline-level="1"><text:bookmark-start text:name="chapter-one-introduction"/>Chapter One: Introduction<text:bookmark-end text:name="chapter-one-introduction"/></text:h>
      <text:p text:style-name="First_20_paragraph">This is the first paragraph with <text:span text:style-name="T1">bold</text:span> and <text:span text:style-name="T2">italic</text:span> text, plus a special char: café &amp; “quotes”.</text:p>
      <text:h text:style-name="Heading_20_2" text:outline-level="2"><text:bookmark-start text:name="section-a"/>Section A<text:bookmark-end text:name="section-a"/></text:h>
      <text:p text:style-name="First_20_paragraph">A second paragraph under section A with a tab and multiple spaces.</text:p>
      <text:list text:style-name="L1">
        <text:list-item>
          <text:p text:style-name="P1">First list item</text:p>
        </text:list-item>
        <text:list-item>
          <text:p text:style-name="P1">Second list item with more text</text:p>
        </text:list-item>
        <text:list-item>
          <text:p text:style-name="P1">Third item</text:p>
        </text:list-item>
      </text:list>
      <text:h text:style-name="Heading_20_2" text:outline-level="2"><text:bookmark-start text:name="section-b"/>Section B<text:bookmark-end text:name="section-b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Role</text:p>
            </table:table-cell>
          </table:table-row>
        </table:table-header-rows>
        <table:table-row>
          <table:table-cell table:style-name="TableRowCell" office:value-type="string">
            <text:p text:style-name="Table_20_Contents">Alice</text:p>
          </table:table-cell>
          <table:table-cell table:style-name="TableRowCell" office:value-type="string">
            <text:p text:style-name="Table_20_Contents">Engineer</text:p>
          </table:table-cell>
        </table:table-row>
        <table:table-row>
          <table:table-cell table:style-name="TableRowCell" office:value-type="string">
            <text:p text:style-name="Table_20_Contents">Bob</text:p>
          </table:table-cell>
          <table:table-cell table:style-name="TableRowCell" office:value-type="string">
            <text:p text:style-name="Table_20_Contents">Designer</text:p>
          </table:table-cell>
        </table:table-row>
      </table:table>
      <text:p text:style-name="First_20_paragraph">Final paragraph after the table. Unicode: 日本語 and emoji 🚀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1</meta:generator>
    <dc:title/>
    <dc:description/>
    <dc:subject/>
    <meta:keyword/>
    <meta:initial-creator/>
    <dc:creator/>
    <meta:creation-date>2026-06-30T19:10:02Z</meta:creation-date>
    <dc:date>2026-06-30T19:10:02Z</dc:date>
  </office:meta>
</office:document-meta>
</file>